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rsid="02f691e7" officeooo:paragraph-rsid="02f72869"/>
    </style:style>
    <style:style style:name="P31" style:family="paragraph" style:parent-style-name="Table_20_Contents">
      <style:text-properties officeooo:rsid="025cf310" officeooo:paragraph-rsid="02f9b49b"/>
    </style:style>
    <style:style style:name="P32" style:family="paragraph" style:parent-style-name="Footnote">
      <style:text-properties officeooo:paragraph-rsid="02ed5f14"/>
    </style:style>
    <style:style style:name="P33" style:family="paragraph" style:parent-style-name="Table_20_Contents">
      <style:text-properties officeooo:rsid="025cf310" officeooo:paragraph-rsid="02d577e8"/>
    </style:style>
    <style:style style:name="P34" style:family="paragraph" style:parent-style-name="Table_20_Contents">
      <style:text-properties officeooo:rsid="025cf310" officeooo:paragraph-rsid="026ef228"/>
    </style:style>
    <style:style style:name="P35" style:family="paragraph" style:parent-style-name="Standard" style:list-style-name="L1">
      <style:text-properties officeooo:paragraph-rsid="01fe3c46"/>
    </style:style>
    <style:style style:name="P36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Footnote">
      <style:text-properties officeooo:paragraph-rsid="02060474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00668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242b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1" style:family="text">
      <style:text-properties style:text-position="super 58%" fo:font-size="10pt" officeooo:rsid="02e5b976" style:font-size-asian="10pt" style:font-size-complex="10pt"/>
    </style:style>
    <style:style style:name="T62" style:family="text">
      <style:text-properties fo:font-size="10pt" officeooo:rsid="02c69795" style:font-size-asian="10pt" style:font-size-complex="10pt"/>
    </style:style>
    <style:style style:name="T63" style:family="text">
      <style:text-properties fo:font-size="10pt" officeooo:rsid="027bb64c" style:font-size-asian="10pt" style:font-size-complex="10pt"/>
    </style:style>
    <style:style style:name="T64" style:family="text">
      <style:text-properties officeooo:rsid="025e46cc"/>
    </style:style>
    <style:style style:name="T65" style:family="text">
      <style:text-properties officeooo:rsid="02f84243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officeooo:rsid="02ba5ce0" style:font-size-asian="10pt" style:font-size-complex="10pt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2pt" officeooo:rsid="025e46cc" style:font-size-asian="12pt" style:font-size-complex="12pt"/>
    </style:style>
    <style:style style:name="T70" style:family="text">
      <style:text-properties fo:font-size="10pt" officeooo:rsid="025e46cc" style:font-size-asian="10pt" style:font-size-complex="10pt"/>
    </style:style>
    <style:style style:name="T71" style:family="text">
      <style:text-properties style:text-position="super 58%" fo:font-size="10pt" officeooo:rsid="02ba5ce0" style:font-size-asian="10pt" style:font-size-complex="10pt"/>
    </style:style>
    <style:style style:name="T72" style:family="text">
      <style:text-properties officeooo:rsid="02fdd225"/>
    </style:style>
    <style:style style:name="T73" style:family="text">
      <style:text-properties officeooo:rsid="02ed5f14"/>
    </style:style>
    <style:style style:name="T74" style:family="text">
      <style:text-properties fo:font-size="10pt" officeooo:rsid="02a5ee23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officeooo:rsid="01e96954"/>
    </style:style>
    <style:style style:name="T123" style:family="text">
      <style:text-properties officeooo:rsid="0119bd75"/>
    </style:style>
    <style:style style:name="T124" style:family="text">
      <style:text-properties officeooo:rsid="02f0d4b0"/>
    </style:style>
    <style:style style:name="T125" style:family="text">
      <style:text-properties officeooo:rsid="02f24b34" fo:background-color="#ffcc99" loext:char-shading-value="0"/>
    </style:style>
    <style:style style:name="T126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, </text:span></text:span><text:span text:style-name="User_20_Entry"><text:span text:style-name="T53">van Ubuntu naar Debian: inhoud </text:span></text:span><text:span text:style-name="User_20_Entry"><text:span text:style-name="T54">~/snap/firefox/common/.mozilla</text:span></text:span><text:span text:style-name="User_20_Entry"><text:span text:style-name="T55"> ==&gt; </text:span></text:span><text:span text:style-name="User_20_Entry"><text:span text:style-name="T54">~/.mozilla</text:span></text:span><text:span text:style-name="User_20_Entry"><text:span text:style-name="T55">,</text:span></text:span><text:span text:style-name="User_20_Entry"><text:span text:style-name="T56"> </text:span></text:span><text:span text:style-name="User_20_Entry"><text:span text:style-name="T57">d</text:span></text:span><text:span text:style-name="User_20_Entry"><text:span text:style-name="T57">a</text:span></text:span><text:span text:style-name="User_20_Entry"><text:span text:style-name="T57">a</text:span></text:span><text:span text:style-name="User_20_Entry"><text:span text:style-name="T57">r</text:span></text:span><text:span text:style-name="User_20_Entry"><text:span text:style-name="T57">n</text:span></text:span><text:span text:style-name="User_20_Entry"><text:span text:style-name="T57">a </text:span></text:span><text:span text:style-name="User_20_Entry"><text:span text:style-name="T58">~/</text:span></text:span><text:span text:style-name="User_20_Entry"><text:span text:style-name="T58">s</text:span></text:span><text:span text:style-name="User_20_Entry"><text:span text:style-name="T58">n</text:span></text:span><text:span text:style-name="User_20_Entry"><text:span text:style-name="T58">a</text:span></text:span><text:span text:style-name="User_20_Entry"><text:span text:style-name="T58">p</text:span></text:span><text:span text:style-name="User_20_Entry"><text:span text:style-name="T59"> </text:span></text:span><text:span text:style-name="User_20_Entry"><text:span text:style-name="T57">v</text:span></text:span><text:span text:style-name="User_20_Entry"><text:span text:style-name="T57">e</text:span></text:span><text:span text:style-name="User_20_Entry"><text:span text:style-name="T57">r</text:span></text:span><text:span text:style-name="User_20_Entry"><text:span text:style-name="T57">w</text:span></text:span><text:span text:style-name="User_20_Entry"><text:span text:style-name="T57">i</text:span></text:span><text:span text:style-name="User_20_Entry"><text:span text:style-name="T57">j</text:span></text:span><text:span text:style-name="User_20_Entry"><text:span text:style-name="T57">d</text:span></text:span><text:span text:style-name="User_20_Entry"><text:span text:style-name="T57">e</text:span></text:span><text:span text:style-name="User_20_Entry"><text:span text:style-name="T57">r</text:span></text:span><text:span text:style-name="User_20_Entry"><text:span text:style-name="T60">e</text:span></text:span><text:span text:style-name="User_20_Entry"><text:span text:style-name="T57">n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61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62">G</text:span><text:span text:style-name="T46">ebr.naam&gt;\AppData\Local\Google\Chrome\User Data</text:span><text:span text:style-name="T63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64">adresboek</text:span>)<text:note text:id="ftn4" text:note-class="footnote"><text:note-citation>2</text:note-citation><text:note-body><text:p text:style-name="P30">Gebruik <text:span text:style-name="T65">als Linux vervanger </text:span>Evolution als ondersteuning voor Microsoft Exchange/EWS vereist is.</text:p></text:note-body></text:note><text:line-break/><text:span text:style-name="T66">C:\Gebruikers\&lt;Gebr.naam&gt;\AppData</text:span><text:span text:style-name="T67">\</text:span><text:span text:style-name="T66">Local</text:span><text:span text:style-name="T67">\</text:span><text:span text:style-name="T66">Microsoft</text:span><text:span text:style-name="T67">\</text:span><text:span text:style-name="T66">Outlook</text:span><text:span text:style-name="T67">\</text:span></text:p>
          </table:table-cell>
          <table:table-cell table:style-name="Tabel4.C2" table:number-rows-spanned="3" office:value-type="string">
            <text:p text:style-name="P31"><text:span text:style-name="T68"><text:line-break/><text:line-break/></text:span><text:span text:style-name="T69">Thunderbird (importeer adresboek)</text:span><text:span text:style-name="T70"><text:line-break/>~/.thunderbird/</text:span><text:span text:style-name="T71"><text:note text:id="ftn5" text:note-class="footnote"><text:note-citation>3</text:note-citation><text:note-body><text:p text:style-name="P32"><text:span text:style-name="T72">I</text:span>nstalleer pst-utils om .pst naar .mbox te converteren m<text:span text:style-name="T73">et</text:span> readpst en installeer de Thunderbird-<text:span text:style-name="T73">add-on </text:span>'ImportExportTools NG' om .mbox te importeren.</text:p></text:note-body></text:note></text:span><text:span text:style-name="T70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indows Mail (exporteer <text:span text:style-name="T64">adresboek)<text:line-break/></text:span><text:span text:style-name="T70">C:\</text:span><text:span text:style-name="T49">Gebru</text:span><text:span text:style-name="T70">ikers\</text:span><text:span text:style-name="T46">&lt;Gebr.naam&gt;</text:span><text:span text:style-name="T70">\AppData\Local\Comms\Unistore\data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Thunderbird (exporteer <text:span text:style-name="T64">adresboek)<text:line-break/></text:span><text:span text:style-name="T70">C:\</text:span><text:span text:style-name="T49">Gebru</text:span><text:span text:style-name="T70">ikers\</text:span><text:span text:style-name="T46">&lt;Gebr.naam&gt;</text:span><text:span text:style-name="T70">\AppData\Roaming\Thunderbird\Profiles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4">Webmail</text:p>
          </table:table-cell>
          <table:table-cell table:style-name="Tabel4.C2" office:value-type="string">
            <text:p text:style-name="P34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5"><text:span text:style-name="Strong_20_Emphasis"><text:span text:style-name="T75">Linux </text:span></text:span><text:span text:style-name="Strong_20_Emphasis"><text:span text:style-name="T76">installeren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7"><text:span text:style-name="T77">Installeer </text:span><text:span text:style-name="T78">Linux </text:span><text:span text:style-name="T77">volgens de </text:span><text:span text:style-name="Strong_20_Emphasis"><text:span text:style-name="T79">Checklist</text:span></text:span><text:span text:style-name="Strong_20_Emphasis"><text:span text:style-name="T80"> i</text:span></text:span><text:span text:style-name="Strong_20_Emphasis"><text:span text:style-name="T81">nstallatie</text:span></text:span><text:span text:style-name="Strong_20_Emphasis"><text:span text:style-name="T82"><text:note text:id="ftn6" text:note-class="footnote"><text:note-citation>4</text:note-citation><text:note-body><text:p text:style-name="P38">Checklist installatie is te vinden op <text:a xlink:type="simple" xlink:href="https://karelzimmer.nl/" text:style-name="Internet_20_link" text:visited-style-name="Visited_20_Internet_20_Link"><text:span text:style-name="T83">karelzimmer.nl</text:span></text:a><text:span text:style-name="T52">, onder </text:span><text:span text:style-name="Sterk_20_accent_20_voetnoot"><text:span text:style-name="T84">Linux</text:span></text:span><text:span text:style-name="T52">.</text:span></text:p></text:note-body></text:note></text:span></text:span><text:span text:style-name="T82">.</text:span></text:p>
          </table:table-cell>
        </table:table-row>
      </table:table>
      <text:list text:continue-numbering="true" text:style-name="L1">
        <text:list-item>
          <text:p text:style-name="P39"><text:soft-page-break/><text:span text:style-name="Strong_20_Emphasis"><text:span text:style-name="T85">Back-up </text:span></text:span><text:span text:style-name="Strong_20_Emphasis"><text:span text:style-name="T86">t</text:span></text:span><text:span text:style-name="Strong_20_Emphasis"><text:span text:style-name="T85">erugzetten</text:span></text:span><text:span text:style-name="Emphasis"><text:span text:style-name="T87"> (</text:span></text:span><text:span text:style-name="Emphasis"><text:span text:style-name="T88">op</text:span></text:span><text:span text:style-name="Emphasis"><text:span text:style-name="T87"> </text:span></text:span><text:span text:style-name="Emphasis"><text:span text:style-name="T89">Linux</text:span></text:span><text:span text:style-name="Emphasis"><text:span text:style-name="T87">)</text:span></text:span><text:span text:style-name="Strong_20_Emphasis"><text:span text:style-name="T26"><text:line-break/></text:span></text:span></text:p>
          <text:p text:style-name="P40"><text:span text:style-name="Emphasis"><text:span text:style-name="T90">De handelingen in dit hoofdstuk dienen </text:span></text:span><text:span text:style-name="Emphasis">per gebruiker</text:span><text:span text:style-name="Emphasis"><text:span text:style-name="T90"> </text:span></text:span><text:span text:style-name="Emphasis"><text:span text:style-name="T91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92"><text:tab/></text:span><text:span text:style-name="Strong_20_Emphasis"><text:span text:style-name="T33">☐ ☐ ☐ ☐</text:span></text:span><text:span text:style-name="T93"><text:tab/></text:span><text:span text:style-name="T26">Koppel de externe harddisk aan.</text:span></text:p>
      <text:p text:style-name="P43"><text:span text:style-name="T92"><text:tab/></text:span><text:span text:style-name="Strong_20_Emphasis"><text:span text:style-name="T33">☐ ☐ ☐ ☐</text:span></text:span><text:span text:style-name="T94"><text:tab/></text:span><text:span text:style-name="T26">Kopieer </text:span><text:span text:style-name="T95">D</text:span><text:span text:style-name="T96">ocumenten, </text:span><text:span text:style-name="T97">etc</text:span><text:span text:style-name="T26">.</text:span></text:p>
      <text:p text:style-name="P44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100">.</text:span></text:p>
      <text:p text:style-name="P44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100">.</text:span></text:p>
      <text:p text:style-name="P45"><text:span text:style-name="Strong_20_Emphasis"><text:span text:style-name="T101"><text:tab/></text:span></text:span><text:span text:style-name="Strong_20_Emphasis"><text:span text:style-name="T33">☐ ☐ ☐ ☐</text:span></text:span><text:span text:style-name="Strong_20_Emphasis"><text:span text:style-name="T94"><text:tab/></text:span></text:span><text:span text:style-name="T102">Start de browser-app en c</text:span><text:span text:style-name="T103">ontroleer de werking</text:span><text:span text:style-name="T27">.</text:span></text:p>
      <text:list text:style-name="L2">
        <text:list-header>
          <text:p text:style-name="P46"><text:span text:style-name="T92"><text:tab/></text:span><text:span text:style-name="Strong_20_Emphasis"><text:span text:style-name="T33">☐ ☐ ☐ ☐</text:span></text:span><text:span text:style-name="T92"><text:tab/></text:span><text:span text:style-name="T102">Start de mail-app en c</text:span><text:span text:style-name="T103">ontroleer de werking</text:span><text:span text:style-name="T27">.</text:span></text:p>
        </text:list-header>
      </text:list>
      <text:p text:style-name="P45"><text:span text:style-name="T92"><text:tab/></text:span><text:span text:style-name="Strong_20_Emphasis"><text:span text:style-name="T33">☐ ☐ ☐ ☐</text:span></text:span><text:span text:style-name="T92"><text:tab/></text:span><text:span text:style-name="T104">Verwijder overbodige Windows-bestanden via </text:span><text:span text:style-name="Strong_20_Emphasis"><text:span text:style-name="T105">Terminalvenster</text:span></text:span><text:span text:style-name="T106"> </text:span><text:span text:style-name="T107">en de volgende opdracht:</text:span></text:p>
      <text:p text:style-name="P47"><text:span text:style-name="T107"><text:tab/><text:tab/><text:tab/><text:tab/><text:tab/></text:span><text:span text:style-name="User_20_Entry"><text:span text:style-name="T108">kz-post-migrate</text:span></text:span></text:p>
      <text:list text:continue-numbering="true" text:style-name="L2">
        <text:list-header>
          <text:p text:style-name="P48"><text:span text:style-name="T109"><text:line-break/><text:tab/></text:span><text:span text:style-name="T110">E</text:span><text:span text:style-name="T111">inde c</text:span><text:span text:style-name="T112">hecklist, </text:span><text:span text:style-name="T113">het overzetten</text:span><text:span text:style-name="T114"> </text:span><text:span text:style-name="T115">is </text:span><text:span text:style-name="T114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16">Geschreven door </text:span><text:a xlink:type="simple" xlink:href="mailto:info@karelzimmer.nl?subject=Checklist%20installatie%20Linux" text:style-name="Internet_20_link" text:visited-style-name="Visited_20_Internet_20_Link"><text:span text:style-name="T117">Karel Zimmer</text:span></text:a><text:span text:style-name="T118">.</text:span></text:p>
              <text:p text:style-name="P51"><text:span text:style-name="T119">Licentie </text:span><text:span text:style-name="T118">C</text:span><text:span text:style-name="T120">C0</text:span><text:span text:style-name="T118"> 1.0 </text:span><text:span text:style-name="T1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1"><text:s/></text:span><text:span text:style-name="T1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22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23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<text:span text:style-name="T124">M</text:span>ailnaam</text:p>
          </table:table-cell>
          <table:table-cell table:style-name="Tabel2.A1" office:value-type="string">
            <text:p text:style-name="P69"><text:span text:style-name="T124">M</text:span>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><text:line-break/><text:span text:style-name="T125">*** L</text:span><text:span text:style-name="T126">eg deze gegevens veilig vast in een wachtwoordkluis zoals Bitwarden en niet op papier </text:span><text:span text:style-name="T125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8T14:50:52.775173843">28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8T14:50:52.776439930">28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4:50:52.705087564</dc:date>
    <meta:print-date>2014-01-05T10:21:33.960023988</meta:print-date>
    <meta:keyword>Installatie</meta:keyword>
    <meta:keyword>Checklist</meta:keyword>
    <meta:keyword>Linux</meta:keyword>
    <meta:editing-cycles>2656</meta:editing-cycles>
    <meta:editing-duration>P5DT15H40M49S</meta:editing-duration>
    <meta:printed-by>Karel Zimmer</meta:printed-by>
    <dc:creator>Karel Zimmer</dc:creator>
    <meta:document-statistic meta:table-count="8" meta:image-count="2" meta:object-count="0" meta:page-count="4" meta:paragraph-count="93" meta:word-count="464" meta:character-count="3662" meta:non-whitespace-character-count="3200"/>
    <meta:user-defined meta:name="Info 1"/>
    <meta:user-defined meta:name="Info 2"/>
    <meta:user-defined meta:name="Info 3"/>
    <meta:user-defined meta:name="Info 4"/>
  </office:meta>
</office:document-meta>
</file>