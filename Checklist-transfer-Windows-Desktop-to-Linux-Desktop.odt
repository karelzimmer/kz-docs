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2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3" style:family="paragraph" style:parent-style-name="Table_20_Contents">
      <style:text-properties officeooo:rsid="025cf310" officeooo:paragraph-rsid="02584bfb"/>
    </style:style>
    <style:style style:name="P24" style:family="paragraph" style:parent-style-name="Table_20_Contents">
      <style:text-properties officeooo:rsid="025cf310" officeooo:paragraph-rsid="0264949e"/>
    </style:style>
    <style:style style:name="P25" style:family="paragraph" style:parent-style-name="Footnote">
      <style:text-properties officeooo:rsid="02bfb317" officeooo:paragraph-rsid="02d9f411"/>
    </style:style>
    <style:style style:name="P26" style:family="paragraph" style:parent-style-name="Table_20_Contents">
      <style:text-properties officeooo:rsid="025cf310" officeooo:paragraph-rsid="02b1c38d"/>
    </style:style>
    <style:style style:name="P27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8" style:family="paragraph" style:parent-style-name="Table_20_Contents">
      <style:text-properties officeooo:rsid="025cf310" officeooo:paragraph-rsid="02cf34d9"/>
    </style:style>
    <style:style style:name="P29" style:family="paragraph" style:parent-style-name="Table_20_Contents">
      <style:text-properties officeooo:rsid="025cf310" officeooo:paragraph-rsid="02d1ca4b"/>
    </style:style>
    <style:style style:name="P30" style:family="paragraph" style:parent-style-name="Footnote">
      <style:text-properties officeooo:paragraph-rsid="02db8a35"/>
    </style:style>
    <style:style style:name="P31" style:family="paragraph" style:parent-style-name="Table_20_Contents">
      <style:text-properties officeooo:rsid="025cf310" officeooo:paragraph-rsid="02acb922"/>
    </style:style>
    <style:style style:name="P32" style:family="paragraph" style:parent-style-name="Standard" style:list-style-name="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officeooo:paragraph-rsid="021505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1">
      <style:paragraph-properties fo:break-before="page"/>
      <style:text-properties officeooo:paragraph-rsid="0215050e"/>
    </style:style>
    <style:style style:name="P34" style:family="paragraph" style:parent-style-name="Standard">
      <style:text-properties officeooo:paragraph-rsid="01be4eb0"/>
    </style:style>
    <style:style style:name="P35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officeooo:paragraph-rsid="0219eedd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4" style:family="paragraph" style:parent-style-name="Footnote">
      <style:text-properties officeooo:rsid="0268f29a" officeooo:paragraph-rsid="027028eb"/>
    </style:style>
    <style:style style:name="P45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85038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808080" loext:opacity="100%" style:font-name="Liberation Sans1" fo:font-size="12pt" fo:language="en" fo:country="US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8" style:family="paragraph" style:parent-style-name="Standard">
      <style:text-properties officeooo:paragraph-rsid="0298dcea"/>
    </style:style>
    <style:style style:name="P69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db8a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d842a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00066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0066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9pt" fo:language="nl" fo:country="NL" fo:font-style="normal" style:text-underline-style="none" fo:font-weight="normal" officeooo:rsid="0301290f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52" style:family="text">
      <style:text-properties style:text-position="super 58%" fo:font-size="10pt" officeooo:rsid="02c03771" style:font-size-asian="10pt" style:font-size-complex="10pt"/>
    </style:style>
    <style:style style:name="T53" style:family="text">
      <style:text-properties fo:font-size="10pt" officeooo:rsid="027bb64c" style:font-size-asian="10pt" style:font-size-complex="10pt"/>
    </style:style>
    <style:style style:name="T54" style:family="text">
      <style:text-properties officeooo:rsid="0264949e"/>
    </style:style>
    <style:style style:name="T55" style:family="text">
      <style:text-properties officeooo:rsid="025e46cc"/>
    </style:style>
    <style:style style:name="T56" style:family="text">
      <style:text-properties officeooo:rsid="026ecec1"/>
    </style:style>
    <style:style style:name="T57" style:family="text">
      <style:text-properties officeooo:rsid="026e928a"/>
    </style:style>
    <style:style style:name="T58" style:family="text">
      <style:text-properties officeooo:rsid="02672f10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0pt" officeooo:rsid="02ba5ce0" style:font-size-asian="10pt" style:font-size-complex="10pt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font-size="10pt" officeooo:rsid="025e46cc" style:font-size-asian="10pt" style:font-size-complex="10pt"/>
    </style:style>
    <style:style style:name="T64" style:family="text">
      <style:text-properties style:text-position="super 58%" fo:font-size="10pt" officeooo:rsid="02ba5ce0" style:font-size-asian="10pt" style:font-size-complex="10pt"/>
    </style:style>
    <style:style style:name="T65" style:family="text">
      <style:text-properties officeooo:rsid="02d4adfd"/>
    </style:style>
    <style:style style:name="T66" style:family="text">
      <style:text-properties fo:color="#000000" loext:opacity="100%" style:text-line-through-style="none" style:text-line-through-type="none" fo:font-family="'Liberation Mono'" style:font-family-generic="modern" style:font-pitch="fixed" fo:font-size="9pt" fo:language="nl" fo:country="NL" fo:font-style="normal" style:text-underline-style="none" fo:font-weight="normal" officeooo:rsid="02db8a35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1pt" fo:language="nl" fo:country="NL" fo:font-style="normal" style:text-underline-style="none" fo:font-weight="normal" officeooo:rsid="0301290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language="en" fo:country="US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language="en" fo:country="US" fo:font-weight="bold" style:font-weight-asian="bold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family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3d34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officeooo:rsid="020686f0"/>
    </style:style>
    <style:style style:name="T111" style:family="text">
      <style:text-properties officeooo:rsid="01e96954"/>
    </style:style>
    <style:style style:name="T112" style:family="text">
      <style:text-properties fo:language="en" fo:country="US" officeooo:rsid="020686f0"/>
    </style:style>
    <style:style style:name="T113" style:family="text">
      <style:text-properties officeooo:rsid="0298dcea"/>
    </style:style>
    <style:style style:name="T114" style:family="text">
      <style:text-properties officeooo:rsid="02c522fd"/>
    </style:style>
    <style:style style:name="T115" style:family="text">
      <style:text-properties officeooo:rsid="02717261"/>
    </style:style>
    <style:style style:name="T116" style:family="text">
      <style:text-properties officeooo:rsid="02c67e8d" fo:background-color="#ffcc99" loext:char-shading-value="0"/>
    </style:style>
    <style:style style:name="T117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ext:p text:style-name="P19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0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/>
          </table:table-cell>
          <table:table-cell table:style-name="Tabel4.A2" office:value-type="string">
            <text:p text:style-name="P21"><text:span text:style-name="T34">In use on</text:span><text:span text:style-name="T36"> </text:span>Windows</text:p>
          </table:table-cell>
          <table:table-cell table:style-name="Tabel4.C2" office:value-type="string">
            <text:p text:style-name="P21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3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4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4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5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text:line-break/></text:span></text:span><text:span text:style-name="User_20_Entry"><text:span text:style-name="T46">F</text:span></text:span><text:span text:style-name="User_20_Entry"><text:span text:style-name="T47">rom</text:span></text:span><text:span text:style-name="User_20_Entry"><text:span text:style-name="T48"> Ubuntu </text:span></text:span><text:span text:style-name="User_20_Entry"><text:span text:style-name="T47">to</text:span></text:span><text:span text:style-name="User_20_Entry"><text:span text:style-name="T48"> Debian: </text:span></text:span><text:span text:style-name="User_20_Entry"><text:span text:style-name="T47">content</text:span></text:span><text:span text:style-name="User_20_Entry"><text:span text:style-name="T48"> </text:span></text:span><text:span text:style-name="User_20_Entry"><text:span text:style-name="T49">~/snap/firefox/common/.mozilla</text:span></text:span><text:span text:style-name="User_20_Entry"><text:span text:style-name="T50"> ==&gt; </text:span></text:span><text:span text:style-name="User_20_Entry"><text:span text:style-name="T49">~/.mozilla/</text:span></text:span><text:span text:style-name="User_20_Entry"><text:span text:style-name="T51">.</text:span></text:span></text:p></text:note-body></text:note></text:span></text:p>
          </table:table-cell>
          <table:table-cell table:style-name="Tabel4.C2" office:value-type="string">
            <text:p text:style-name="P26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52">1</text:span></text:p>
          </table:table-cell>
        </table:table-row>
        <table:table-row>
          <table:table-cell table:style-name="Tabel4.A2" office:value-type="string">
            <text:p text:style-name="P22"><text:span text:style-name="Strong_20_Emphasis"><text:span text:style-name="T25">☐</text:span></text:span></text:p>
          </table:table-cell>
          <table:table-cell table:style-name="Tabel4.A2" office:value-type="string">
            <text:p text:style-name="P23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53">\</text:span></text:p>
          </table:table-cell>
          <table:table-cell table:style-name="Tabel4.C2" office:value-type="string">
            <text:p text:style-name="P23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20">Mail app migrati<text:span text:style-name="T54">on</text:span> <text:span text:style-name="T54">from</text:span><text:span text:style-name="T35"> Windows </text:span><text:span text:style-name="T5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2"><text:span text:style-name="Strong_20_Emphasis"><text:span text:style-name="T25"/></text:span></text:p>
          </table:table-cell>
          <table:table-cell table:style-name="Tabel7.A2" office:value-type="string">
            <text:p text:style-name="P27"><text:span text:style-name="T34">In use on</text:span><text:span text:style-name="T36"> </text:span>Windows</text:p>
          </table:table-cell>
          <table:table-cell table:style-name="Tabel7.C2" office:value-type="string">
            <text:p text:style-name="P27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28">Microsoft Outlook (export <text:span text:style-name="T55">ad</text:span><text:span text:style-name="T56">d</text:span><text:span text:style-name="T55">re</text:span><text:span text:style-name="T57">s</text:span><text:span text:style-name="T55">s bo</text:span><text:span text:style-name="T58">o</text:span><text:span text:style-name="T55">k</text:span>)<text:note text:id="ftn4" text:note-class="footnote"><text:note-citation>2</text:note-citation><text:note-body><text:p text:style-name="Footnote">As a Linux replacement, use Evolution if support for Microsoft Exchange/EWS is required.</text:p></text:note-body></text:note><text:line-break/><text:span text:style-name="T59">C:\Users\&lt;Username&gt;\\AppData</text:span><text:span text:style-name="T60">\</text:span><text:span text:style-name="T59">Local</text:span><text:span text:style-name="T60">\</text:span><text:span text:style-name="T59">Microsoft</text:span><text:span text:style-name="T60">\</text:span><text:span text:style-name="T59">Outlook</text:span><text:span text:style-name="T60">\</text:span></text:p>
          </table:table-cell>
          <table:table-cell table:style-name="Tabel7.C2" table:number-rows-spanned="3" office:value-type="string">
            <text:p text:style-name="P29"><text:span text:style-name="T61"><text:line-break/></text:span><text:span text:style-name="T62"><text:line-break/></text:span>Thunderbird (import <text:span text:style-name="T55">ad</text:span><text:span text:style-name="T57">d</text:span><text:span text:style-name="T55">res</text:span><text:span text:style-name="T57">s </text:span><text:span text:style-name="T55">bo</text:span><text:span text:style-name="T58">o</text:span><text:span text:style-name="T55">k</text:span>)<text:line-break/><text:span text:style-name="T63">~/.thunderbird/</text:span><text:span text:style-name="T64"><text:note text:id="ftn5" text:note-class="footnote"><text:note-citation>3</text:note-citation><text:note-body><text:p text:style-name="P30"><text:span text:style-name="T65">I</text:span>nstall pst-utils to convert .pst to .mbox using readpst, and install the Thunderbird add-on 'ImportExportTools NG' to import .mbox.<text:line-break/><text:span text:style-name="User_20_Entry"><text:span text:style-name="T46">F</text:span></text:span><text:span text:style-name="User_20_Entry"><text:span text:style-name="T47">rom</text:span></text:span><text:span text:style-name="User_20_Entry"><text:span text:style-name="T48"> Ubuntu </text:span></text:span><text:span text:style-name="User_20_Entry"><text:span text:style-name="T47">to</text:span></text:span><text:span text:style-name="User_20_Entry"><text:span text:style-name="T48"> Debian: </text:span></text:span><text:span text:style-name="User_20_Entry"><text:span text:style-name="T47">content</text:span></text:span><text:span text:style-name="User_20_Entry"><text:span text:style-name="T48"> </text:span></text:span><text:span text:style-name="User_20_Entry"><text:span text:style-name="T49">~/snap/</text:span></text:span><text:span text:style-name="User_20_Entry"><text:span text:style-name="T66">t</text:span></text:span><text:span text:style-name="User_20_Entry"><text:span text:style-name="T66">h</text:span></text:span><text:span text:style-name="User_20_Entry"><text:span text:style-name="T66">u</text:span></text:span><text:span text:style-name="User_20_Entry"><text:span text:style-name="T66">n</text:span></text:span><text:span text:style-name="User_20_Entry"><text:span text:style-name="T66">d</text:span></text:span><text:span text:style-name="User_20_Entry"><text:span text:style-name="T66">e</text:span></text:span><text:span text:style-name="User_20_Entry"><text:span text:style-name="T66">r</text:span></text:span><text:span text:style-name="User_20_Entry"><text:span text:style-name="T66">b</text:span></text:span><text:span text:style-name="User_20_Entry"><text:span text:style-name="T66">i</text:span></text:span><text:span text:style-name="User_20_Entry"><text:span text:style-name="T66">r</text:span></text:span><text:span text:style-name="User_20_Entry"><text:span text:style-name="T66">d</text:span></text:span><text:span text:style-name="User_20_Entry"><text:span text:style-name="T49">/common/.</text:span></text:span><text:span text:style-name="User_20_Entry"><text:span text:style-name="T66">thunderbird</text:span></text:span><text:span text:style-name="User_20_Entry"><text:span text:style-name="T50"> ==&gt; </text:span></text:span><text:span text:style-name="User_20_Entry"><text:span text:style-name="T49">~/.</text:span></text:span><text:span text:style-name="User_20_Entry"><text:span text:style-name="T66">thunderbird</text:span></text:span><text:span text:style-name="User_20_Entry"><text:span text:style-name="T49">/</text:span></text:span><text:span text:style-name="User_20_Entry"><text:span text:style-name="T67">.</text:span></text:span></text:p></text:note-body></text:note></text:span></text:p>
          </table:table-cell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31">Windows Mail (export <text:span text:style-name="T55">ad</text:span><text:span text:style-name="T56">d</text:span><text:span text:style-name="T55">re</text:span><text:span text:style-name="T57">s</text:span><text:span text:style-name="T55">s bo</text:span><text:span text:style-name="T58">o</text:span><text:span text:style-name="T55">k)<text:line-break/></text:span><text:span text:style-name="T63">C:\Users\</text:span><text:span text:style-name="T38">&lt;Username&gt;</text:span><text:span text:style-name="T63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31">Thunderbird (export <text:span text:style-name="T55">ad</text:span><text:span text:style-name="T57">d</text:span><text:span text:style-name="T55">res</text:span><text:span text:style-name="T57">s</text:span><text:span text:style-name="T55"> bo</text:span><text:span text:style-name="T58">o</text:span><text:span text:style-name="T55">k)<text:line-break/></text:span><text:span text:style-name="T63">C:\</text:span><text:span text:style-name="T41">Users</text:span><text:span text:style-name="T63">\</text:span><text:span text:style-name="T38">&lt;Username&gt;\</text:span><text:span text:style-name="T63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2"><text:span text:style-name="Strong_20_Emphasis"><text:span text:style-name="T25">☐</text:span></text:span></text:p>
          </table:table-cell>
          <table:table-cell table:style-name="Tabel7.A2" office:value-type="string">
            <text:p text:style-name="P23">Webmail</text:p>
          </table:table-cell>
          <table:table-cell table:style-name="Tabel7.C2" office:value-type="string">
            <text:p text:style-name="P23">Webmail</text:p>
          </table:table-cell>
        </table:table-row>
      </table:table>
      <text:p text:style-name="P18"/>
      <text:p text:style-name="P18"><text:soft-page-break/></text:p>
      <text:p text:style-name="P32"><text:span text:style-name="Strong_20_Emphasis"><text:span text:style-name="T68"/></text:span></text:p>
      <text:list text:continue-numbering="true" text:style-name="L1">
        <text:list-item>
          <text:p text:style-name="P33"><text:span text:style-name="Strong_20_Emphasis"><text:span text:style-name="T68">Install </text:span></text:span><text:span text:style-name="Strong_20_Emphasis"><text:span text:style-name="T69">Linux</text:span></text:span></text:p>
        </text:list-item>
      </text:list>
      <text:p text:style-name="P34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5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6"><text:span text:style-name="T70">Install </text:span><text:span text:style-name="T71">Linux </text:span><text:span text:style-name="T70">according to the </text:span><text:span text:style-name="T72">Checklist i</text:span><text:span text:style-name="T73">nstallation</text:span><text:span text:style-name="T70"><text:note text:id="ftn6" text:note-class="footnote"><text:note-citation>1</text:note-citation><text:note-body><text:p text:style-name="P37"><text:span text:style-name="T74">Checklist installation can be found </text:span><text:span text:style-name="Strong_20_Emphasis"><text:span text:style-name="T75">at </text:span></text:span><text:a xlink:type="simple" xlink:href="https://karelzimmer.nl/html/en/home.html" text:style-name="Internet_20_link" text:visited-style-name="Visited_20_Internet_20_Link"><text:span text:style-name="Strong_20_Emphasis"><text:span text:style-name="T76">karelzimmer.nl/en</text:span></text:span></text:a><text:span text:style-name="Strong_20_Emphasis"><text:span text:style-name="T75">, under</text:span></text:span><text:span text:style-name="T74"> </text:span><text:span text:style-name="T77">Linux</text:span><text:span text:style-name="T74">.</text:span></text:p></text:note-body></text:note></text:span><text:span text:style-name="T70">.</text:span></text:p>
          </table:table-cell>
        </table:table-row>
      </table:table>
      <text:p text:style-name="P38"><text:span text:style-name="Strong_20_Emphasis"><text:span text:style-name="T78"/></text:span></text:p>
      <text:p text:style-name="P38"><text:span text:style-name="Strong_20_Emphasis"><text:span text:style-name="T78"/></text:span></text:p>
      <text:list text:continue-numbering="true" text:style-name="L1">
        <text:list-item>
          <text:p text:style-name="P39"><text:span text:style-name="Strong_20_Emphasis"><text:span text:style-name="T78">Restore backup</text:span></text:span><text:span text:style-name="Emphasis"><text:span text:style-name="T79"> (on Linux)</text:span></text:span><text:span text:style-name="T80"><text:line-break/></text:span></text:p>
          <text:p text:style-name="P40"><text:span text:style-name="Emphasis"><text:span text:style-name="T81">The actions in this chapter must be performed </text:span></text:span><text:span text:style-name="Emphasis"><text:span text:style-name="T82">per user</text:span></text:span><text:span text:style-name="Emphasis"><text:span text:style-name="T81">.</text:span></text:span></text:p>
        </text:list-item>
      </text:list>
      <text:p text:style-name="P41"/>
      <text:p text:style-name="P38"><text:span text:style-name="T83"><text:tab/></text:span><text:span text:style-name="T84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85">Connect the external hard disk.</text:span></text:p>
      <text:p text:style-name="P42"><text:tab/><text:span text:style-name="Strong_20_Emphasis"><text:span text:style-name="T25">☐ ☐ ☐ ☐<text:tab/></text:span></text:span><text:span text:style-name="T86">Copy</text:span><text:span text:style-name="T80"> </text:span><text:span text:style-name="T87">Documents</text:span><text:span text:style-name="T88">, </text:span><text:span text:style-name="T89">etc</text:span><text:span text:style-name="T80">.</text:span></text:p>
      <text:p text:style-name="P43"><text:tab/><text:span text:style-name="Strong_20_Emphasis"><text:span text:style-name="T25">☐ ☐ ☐ ☐<text:tab/></text:span></text:span><text:span text:style-name="Strong_20_Emphasis"><text:span text:style-name="T90">I</text:span></text:span><text:span text:style-name="Strong_20_Emphasis"><text:span text:style-name="T91">mport browser app </text:span></text:span><text:span text:style-name="Strong_20_Emphasis"><text:span text:style-name="T92">data</text:span></text:span><text:span text:style-name="Strong_20_Emphasis"><text:span text:style-name="T93"><text:note text:id="ftn7" text:note-class="footnote"><text:note-citation>2</text:note-citation><text:note-body><text:p text:style-name="P44">See the table “Browser app migration from Windows to Linux” on the previous page.</text:p></text:note-body></text:note></text:span></text:span><text:span text:style-name="Strong_20_Emphasis"><text:span text:style-name="T94">.</text:span></text:span></text:p>
      <text:p text:style-name="P43"><text:span text:style-name="Strong_20_Emphasis"><text:span text:style-name="T95"><text:tab/></text:span></text:span><text:span text:style-name="Strong_20_Emphasis"><text:span text:style-name="T25">☐ ☐ ☐ ☐</text:span></text:span><text:span text:style-name="Strong_20_Emphasis"><text:span text:style-name="T95"><text:tab/></text:span></text:span><text:span text:style-name="Strong_20_Emphasis"><text:span text:style-name="T90">I</text:span></text:span><text:span text:style-name="Strong_20_Emphasis"><text:span text:style-name="T91">mport </text:span></text:span><text:span text:style-name="Strong_20_Emphasis"><text:span text:style-name="T92">mail </text:span></text:span><text:span text:style-name="Strong_20_Emphasis"><text:span text:style-name="T91">app </text:span></text:span><text:span text:style-name="Strong_20_Emphasis"><text:span text:style-name="T92">data</text:span></text:span><text:span text:style-name="Strong_20_Emphasis"><text:span text:style-name="T93"><text:note text:id="ftn8" text:note-class="footnote"><text:note-citation>3</text:note-citation><text:note-body><text:p text:style-name="P44">See the table “<text:span text:style-name="T29">Mail</text:span> app migration from Windows to Linux” on the previous page.</text:p></text:note-body></text:note></text:span></text:span><text:span text:style-name="Strong_20_Emphasis"><text:span text:style-name="T94">.</text:span></text:span></text:p>
      <text:list text:style-name="L2">
        <text:list-header>
          <text:p text:style-name="P45"><text:span text:style-name="T96"><text:tab/></text:span><text:span text:style-name="Strong_20_Emphasis"><text:span text:style-name="T25">☐ ☐ ☐ ☐</text:span></text:span><text:span text:style-name="Strong_20_Emphasis"><text:span text:style-name="T95"><text:tab/></text:span></text:span><text:span text:style-name="T85">Start </text:span><text:span text:style-name="T97">the browser app</text:span><text:span text:style-name="T85"> and check the operation.</text:span></text:p>
          <text:p text:style-name="P46"><text:span text:style-name="T96"><text:tab/></text:span><text:span text:style-name="Strong_20_Emphasis"><text:span text:style-name="T25">☐ ☐ ☐ ☐</text:span></text:span><text:span text:style-name="Strong_20_Emphasis"><text:span text:style-name="T95"><text:tab/></text:span></text:span><text:span text:style-name="T85">Start </text:span><text:span text:style-name="T97">the mail app</text:span><text:span text:style-name="T85"> and check the operation.</text:span></text:p>
        </text:list-header>
      </text:list>
      <text:p text:style-name="P47"><text:tab/><text:span text:style-name="Strong_20_Emphasis"><text:span text:style-name="T25">☐ ☐ ☐ ☐</text:span></text:span><text:span text:style-name="Strong_20_Emphasis"><text:span text:style-name="T95"><text:tab/></text:span></text:span><text:span text:style-name="T96">Remove unnecessary Windows files via </text:span><text:span text:style-name="Strong_20_Emphasis"><text:span text:style-name="T98">Terminal</text:span></text:span><text:span text:style-name="T96"> and the following command:<text:line-break/></text:span><text:span text:style-name="T99"><text:tab/><text:tab/><text:tab/><text:tab/><text:tab/></text:span><text:span text:style-name="User_20_Entry"><text:span text:style-name="T100">kz-post-migrate</text:span></text:span></text:p>
      <text:p text:style-name="P48"/>
      <text:list text:continue-numbering="true" text:style-name="L2">
        <text:list-header>
          <text:p text:style-name="P49"><text:span text:style-name="T101"><text:line-break/><text:tab/></text:span><text:span text:style-name="T102">End of checklist, the transfer is complete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103">Written</text:span><text:span text:style-name="T104"> </text:span><text:span text:style-name="T103">by</text:span><text:span text:style-name="T104"> </text:span><text:a xlink:type="simple" xlink:href="mailto:info@karelzimmer.nl?subject=Checklist%20installation%20Linux" text:style-name="Internet_20_link" text:visited-style-name="Visited_20_Internet_20_Link"><text:span text:style-name="T105">Karel Zimmer</text:span></text:a><text:span text:style-name="T106">.</text:span></text:p>
              <text:p text:style-name="P51"><text:span text:style-name="T107">License </text:span><text:span text:style-name="T106">C</text:span><text:span text:style-name="T108">C0</text:span><text:span text:style-name="T106"> 1.0</text:span><text:span text:style-name="T109"> </text:span><text:span text:style-name="T10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9"><text:s/></text:span><text:span text:style-name="T10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9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<text:span text:style-name="T110">User</text:span>#</text:p>
            <text:p text:style-name="P53"/>
          </table:table-cell>
          <table:table-cell table:style-name="Tabel1.A1" table:number-rows-spanned="2" office:value-type="string">
            <text:p text:style-name="P54">Name</text:p>
            <text:p text:style-name="P55">(<text:span text:style-name="T110">e.g</text:span>. Jan <text:span text:style-name="T111">Jansen</text:span>)</text:p>
          </table:table-cell>
          <table:table-cell table:style-name="Tabel1.A1" table:number-rows-spanned="2" office:value-type="string">
            <text:p text:style-name="P54">Username</text:p>
            <text:p text:style-name="P55">(<text:span text:style-name="T110">e.g</text:span>. jan)</text:p>
          </table:table-cell>
          <table:table-cell table:style-name="Tabel1.D1" table:number-rows-spanned="2" office:value-type="string">
            <text:p text:style-name="P56">Passw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 <text:span text:style-name="T110">password</text:span>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<text:span text:style-name="T110">F</text:span>i netw<text:span text:style-name="T110">o</text:span>rk na<text:span text:style-name="T110">me</text:span>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63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Network key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5">Router <text:span text:style-name="T110">user</text:span>/<text:span text:style-name="T110">passwd</text:span>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P68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9"><text:span text:style-name="T112">User</text:span><text:span text:style-name="T74">#</text:span></text:p>
          </table:table-cell>
          <table:table-cell table:style-name="Tabel2.A1" office:value-type="string">
            <text:p text:style-name="P70"><text:span text:style-name="T113">Seq.</text:span>#</text:p>
          </table:table-cell>
          <table:table-cell table:style-name="Tabel2.A1" office:value-type="string">
            <text:p text:style-name="P71"><text:span text:style-name="T114">M</text:span>ail nam<text:span text:style-name="T110">e</text:span></text:p>
          </table:table-cell>
          <table:table-cell table:style-name="Tabel2.A1" office:value-type="string">
            <text:p text:style-name="P71"><text:span text:style-name="T114">M</text:span>ail <text:span text:style-name="T115">address</text:span></text:p>
          </table:table-cell>
          <table:table-cell table:style-name="Tabel2.A1" office:value-type="string">
            <text:p text:style-name="P72">User name</text:p>
          </table:table-cell>
          <table:table-cell table:style-name="Tabel2.F1" office:value-type="string">
            <text:p text:style-name="P73">Password</text:p>
          </table:table-cell>
        </table:table-row>
        <table:table-row table:style-name="Tabel2.2"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69"/>
          </table:table-cell>
          <table:table-cell table:style-name="Tabel2.A2" office:value-type="string">
            <text:p text:style-name="P74"/>
          </table:table-cell>
          <table:table-cell table:style-name="Tabel2.F2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69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</table:table>
      <text:p text:style-name="P76"><text:line-break/><text:span text:style-name="T116">*** S</text:span><text:span text:style-name="T117">tore this information securely in a password vault such as Bitwarden and not on paper </text:span><text:span text:style-name="T116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6-04-28T15:01:25.810752748">04/28/2026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5</text:page-number></text:span><text:span text:style-name="MT2"><text:s/></text:span><text:span text:style-name="MT5">van </text:span><text:span text:style-name="MT2"><text:page-count style:num-format="1">5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6-04-28T15:01:25.812142677">04/28/2026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5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4-28T15:01:25.717846681</dc:date>
    <meta:print-date>2014-01-05T10:21:33.960023988</meta:print-date>
    <meta:keyword>Installatie</meta:keyword>
    <meta:keyword>Checklist</meta:keyword>
    <meta:keyword>Linux</meta:keyword>
    <meta:editing-cycles>2615</meta:editing-cycles>
    <meta:editing-duration>P5DT11H39M51S</meta:editing-duration>
    <meta:printed-by>Karel Zimmer</meta:printed-by>
    <dc:creator>Karel Zimmer</dc:creator>
    <meta:document-statistic meta:table-count="8" meta:image-count="2" meta:object-count="0" meta:page-count="5" meta:paragraph-count="91" meta:word-count="508" meta:character-count="3484" meta:non-whitespace-character-count="2973"/>
    <meta:user-defined meta:name="Info 1"/>
    <meta:user-defined meta:name="Info 2"/>
    <meta:user-defined meta:name="Info 3"/>
    <meta:user-defined meta:name="Info 4"/>
  </office:meta>
</office:document-meta>
</file>